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Standaard" style:family="paragraph">
      <style:paragraph-properties fo:break-before="page"/>
      <style:text-properties fo:hyphenate="true"/>
    </style:style>
    <style:style style:name="T3" style:parent-style-name="Standaardalinea-lettertype" style:family="text">
      <style:text-properties style:language-asian="nl" style:country-asian="B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1.82646in, 0in, 0.19451in, 0in)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shadow="0.02946in 0.02946in 0pc #000000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oofstuk 2 Onze fysieke wereld</text:p>
      <text:h text:style-name="Kop1" text:outline-level="1">Big blue dot.</text:h>
      <text:p text:style-name="Standaard">We zijn maar een puntje in<text:s/>het universum.<text:s/></text:p>
      <text:p text:style-name="Standaard"><draw:frame draw:style-name="a0" draw:name="Afbeelding 5" text:anchor-type="as-char" svg:x="0in" svg:y="0in" svg:width="6.28472in" svg:height="4.19444in" style:rel-width="scale" style:rel-height="scale"><draw:image xlink:href="media/image1.jpeg" xlink:type="simple" xlink:show="embed" xlink:actuate="onLoad"/><svg:title/><svg:desc/></draw:frame></text:p>
      <text:soft-page-break/>
      <text:h text:style-name="Kop1" text:outline-level="1">Een groot spanningsveld.</text:h>
      <text:h text:style-name="Kop2" text:outline-level="2">De gelaagde doorsnede van de aarde</text:h>
      <text:p text:style-name="Standaard"><draw:frame draw:style-name="a1" draw:name="Afbeelding 3" text:anchor-type="as-char" svg:x="0in" svg:y="0in" svg:width="6.25in" svg:height="4.22917in" style:rel-width="scale" style:rel-height="scale"><draw:image xlink:href="media/image2.png" xlink:type="simple" xlink:show="embed" xlink:actuate="onLoad"/><svg:title/><svg:desc/></draw:frame></text:p>
      <text:p text:style-name="P2"/>
      <text:soft-page-break/>
      <text:h text:style-name="Kop1" text:outline-level="1"><draw:frame draw:z-index="251660288" draw:style-name="a2" draw:transform="translate(-1.31445in -0.91687in) rotate(-0.40058) translate(5.2457in 0.5516in)" draw:name="Afbeelding 69" text:anchor-type="paragraph" svg:width="2.62891in" svg:height="1.83375in" style:rel-width="scale" style:rel-height="scale"><draw:image xlink:href="media/image3.jpeg" xlink:type="simple" xlink:show="embed" xlink:actuate="onLoad"/><svg:title/><svg:desc>Er mag al eens gelachen worden | sogetinformed</svg:desc></draw:frame>Onze atmosfeer</text:h>
      <text:h text:style-name="Kop2" text:outline-level="2">Broeikaseffect.</text:h>
      <text:p text:style-name="Standaard"/>
      <text:h text:style-name="Kop2" text:outline-level="2">Versterkt broeikaseffect.<text:s/></text:h>
      <text:p text:style-name="Standaard"><text:span text:style-name="T3"><draw:frame draw:z-index="251659264" draw:style-name="a3" draw:name="Afbeelding 51" text:anchor-type="paragraph" svg:x="0.00208in" svg:y="0.00139in" svg:width="6.3in" svg:height="2.19653in" style:rel-width="scale" style:rel-height="scale"><draw:image xlink:href="media/image4.jpg" xlink:type="simple" xlink:show="embed" xlink:actuate="onLoad"/><svg:title/><svg:desc>Afbeelding met tekst, schermopname

Automatisch gegenereerde beschrijving</svg:desc></draw:frame></text:span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h text:style-name="Kop3" text:outline-level="3">Oorzaken van het versterkt broeikaseffect.</text:h>
      <text:p text:style-name="Standaard"/>
      <text:p text:style-name="Standaard"/>
      <text:h text:style-name="Kop3" text:outline-level="3">Gevolgen van het versterkt broeikaseffect.</text:h>
      <text:p text:style-name="Standaard"/>
      <text:soft-page-break/>
      <text:h text:style-name="Kop2" text:outline-level="2">De zon schijnt niet voor iedereen evenveel<draw:frame draw:style-name="a4" draw:name="Afbeelding 4" text:anchor-type="as-char" svg:x="0in" svg:y="0in" svg:width="6.28472in" svg:height="4.19444in" style:rel-width="scale" style:rel-height="scale"><draw:image xlink:href="media/image1.jpeg" xlink:type="simple" xlink:show="embed" xlink:actuate="onLoad"/><svg:title/><svg:desc/></draw:frame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Verbetering" style:display-name="Verbetering" style:family="paragraph" style:parent-style-name="Standaard" style:auto-update="true">
      <style:paragraph-properties fo:margin-bottom="0in" fo:line-height="100%"/>
      <style:text-properties fo:color="#C00000" fo:hyphenate="false"/>
    </style:style>
    <style:style style:name="VerbeteringChar" style:display-name="Verbetering Char" style:family="text" style:parent-style-name="Standaardalinea-lettertype">
      <style:text-properties fo:color="#C00000"/>
    </style:style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ristian Toisoul</meta:initial-creator>
    <dc:creator>Christian Toisoul</dc:creator>
    <meta:creation-date>2026-07-09T20:15:00Z</meta:creation-date>
    <dc:date>2026-07-10T15:06:00Z</dc:date>
    <meta:template xlink:href="Normal.dotm" xlink:type="simple"/>
    <meta:editing-cycles>5</meta:editing-cycles>
    <meta:editing-duration>PT4200S</meta:editing-duration>
    <meta:document-statistic meta:page-count="4" meta:paragraph-count="1" meta:word-count="54" meta:character-count="355" meta:row-count="2" meta:non-whitespace-character-count="302"/>
  </office:meta>
</office:document-meta>
</file>